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style:font-name="Times New Roman" style:font-name-complex="Times New Roman"/>
    </style:style>
    <style:style style:name="P6" style:parent-style-name="Normal" style:family="paragraph">
      <style:text-properties style:font-name="Times New Roman" style:font-name-complex="Times New Roman"/>
    </style:style>
    <style:style style:name="T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text-properties style:font-name="Times New Roman" style:font-name-complex="Times New Roman"/>
    </style:style>
    <style:style style:name="P10" style:parent-style-name="Normal" style:family="paragraph">
      <style:text-properties style:font-name="Times New Roman" style:font-name-complex="Times New Roman"/>
    </style:style>
    <style:style style:name="P11" style:parent-style-name="Normal" style:family="paragraph">
      <style:text-properties style:font-name="Times New Roman" style:font-name-complex="Times New Roman"/>
    </style:style>
    <style:style style:name="P12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text-properties style:font-name="Times New Roman" style:font-name-complex="Times New Roman"/>
    </style:style>
    <style:style style:name="P1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" style:parent-style-name="ListParagraph" style:list-style-name="LFO6" style:family="paragraph">
      <style:text-properties style:font-name="Times New Roman" style:font-name-complex="Times New Roman"/>
    </style:style>
    <style:style style:name="P16" style:parent-style-name="ListParagraph" style:list-style-name="LFO6" style:family="paragraph">
      <style:text-properties style:font-name="Times New Roman" style:font-name-complex="Times New Roman"/>
    </style:style>
    <style:style style:name="P17" style:parent-style-name="ListParagraph" style:list-style-name="LFO6" style:family="paragraph">
      <style:text-properties style:font-name="Times New Roman" style:font-name-complex="Times New Roman"/>
    </style:style>
    <style:style style:name="P18" style:parent-style-name="ListParagraph" style:list-style-name="LFO6" style:family="paragraph">
      <style:text-properties style:font-name="Times New Roman" style:font-name-complex="Times New Roman"/>
    </style:style>
    <style:style style:name="P19" style:parent-style-name="ListParagraph" style:list-style-name="LFO6" style:family="paragraph">
      <style:text-properties style:font-name="Times New Roman" style:font-name-complex="Times New Roman"/>
    </style:style>
    <style:style style:name="P20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" style:parent-style-name="ListParagraph" style:list-style-name="LFO4" style:family="paragraph">
      <style:text-properties style:font-name="Times New Roman" style:font-name-complex="Times New Roman"/>
    </style:style>
    <style:style style:name="P22" style:parent-style-name="ListParagraph" style:list-style-name="LFO4" style:family="paragraph">
      <style:text-properties style:font-name="Times New Roman" style:font-name-complex="Times New Roman"/>
    </style:style>
    <style:style style:name="P23" style:parent-style-name="ListParagraph" style:list-style-name="LFO4" style:family="paragraph">
      <style:text-properties style:font-name="Times New Roman" style:font-name-complex="Times New Roman"/>
    </style:style>
    <style:style style:name="P2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" style:parent-style-name="ListParagraph" style:list-style-name="LFO2" style:family="paragraph">
      <style:text-properties style:font-name="Times New Roman" style:font-name-complex="Times New Roman"/>
    </style:style>
    <style:style style:name="P26" style:parent-style-name="ListParagraph" style:list-style-name="LFO2" style:family="paragraph">
      <style:text-properties style:font-name="Times New Roman" style:font-name-complex="Times New Roman"/>
    </style:style>
    <style:style style:name="P27" style:parent-style-name="ListParagraph" style:list-style-name="LFO2" style:family="paragraph">
      <style:text-properties style:font-name="Times New Roman" style:font-name-complex="Times New Roman"/>
    </style:style>
    <style:style style:name="P28" style:parent-style-name="ListParagraph" style:list-style-name="LFO2" style:family="paragraph">
      <style:text-properties style:font-name="Times New Roman" style:font-name-complex="Times New Roman"/>
    </style:style>
    <style:style style:name="P29" style:parent-style-name="Normal" style:family="paragraph">
      <style:text-properties style:font-name="Times New Roman" style:font-name-complex="Times New Roman"/>
    </style:style>
    <style:style style:name="P30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" style:parent-style-name="ListParagraph" style:list-style-name="LFO2" style:family="paragraph">
      <style:text-properties style:font-name="Times New Roman" style:font-name-complex="Times New Roman"/>
    </style:style>
    <style:style style:name="P32" style:parent-style-name="ListParagraph" style:list-style-name="LFO2" style:family="paragraph">
      <style:text-properties style:font-name="Times New Roman" style:font-name-complex="Times New Roman"/>
    </style:style>
    <style:style style:name="P33" style:parent-style-name="ListParagraph" style:list-style-name="LFO2" style:family="paragraph">
      <style:text-properties style:font-name="Times New Roman" style:font-name-complex="Times New Roman"/>
    </style:style>
    <style:style style:name="P34" style:parent-style-name="ListParagraph" style:list-style-name="LFO2" style:family="paragraph">
      <style:text-properties style:font-name="Times New Roman" style:font-name-complex="Times New Roman"/>
    </style:style>
    <style:style style:name="P35" style:parent-style-name="ListParagraph" style:list-style-name="LFO2" style:family="paragraph">
      <style:text-properties style:font-name="Times New Roman" style:font-name-complex="Times New Roman"/>
    </style:style>
    <style:style style:name="P36" style:parent-style-name="Normal" style:family="paragraph">
      <style:text-properties style:font-name="Times New Roman" style:font-name-complex="Times New Roman"/>
    </style:style>
    <style:style style:name="P3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" style:parent-style-name="ListParagraph" style:list-style-name="LFO7" style:family="paragraph">
      <style:text-properties style:font-name="Times New Roman" style:font-name-complex="Times New Roman"/>
    </style:style>
    <style:style style:name="P39" style:parent-style-name="ListParagraph" style:list-style-name="LFO7" style:family="paragraph">
      <style:text-properties style:font-name="Times New Roman" style:font-name-complex="Times New Roman"/>
    </style:style>
    <style:style style:name="P40" style:parent-style-name="ListParagraph" style:list-style-name="LFO7" style:family="paragraph">
      <style:text-properties style:font-name="Times New Roman" style:font-name-complex="Times New Roman"/>
    </style:style>
    <style:style style:name="P41" style:parent-style-name="ListParagraph" style:list-style-name="LFO7" style:family="paragraph">
      <style:text-properties style:font-name="Times New Roman" style:font-name-complex="Times New Roman"/>
    </style:style>
    <style:style style:name="P42" style:parent-style-name="ListParagraph" style:list-style-name="LFO7" style:family="paragraph">
      <style:text-properties style:font-name="Times New Roman" style:font-name-complex="Times New Roman"/>
    </style:style>
    <style:style style:name="P43" style:parent-style-name="ListParagraph" style:list-style-name="LFO7" style:family="paragraph">
      <style:text-properties style:font-name="Times New Roman" style:font-name-complex="Times New Roman"/>
    </style:style>
    <style:style style:name="P44" style:parent-style-name="ListParagraph" style:list-style-name="LFO7" style:family="paragraph">
      <style:text-properties style:font-name="Times New Roman" style:font-name-complex="Times New Roman"/>
    </style:style>
    <style:style style:name="P45" style:parent-style-name="ListParagraph" style:list-style-name="LFO7" style:family="paragraph"/>
    <style:style style:name="T46" style:parent-style-name="DefaultParagraphFont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Action Learning Project Proposal Template</text:p>
      <text:p text:style-name="P2">Project Proposal:<text:s/>P2P Directory share</text:p>
      <text:p text:style-name="Normal"><text:span text:style-name="T3">1.<text:s/></text:span><text:span text:style-name="T4">Overview – Context, Story</text:span></text:p>
      <text:p text:style-name="P5">University students frequently work in temporary groups and need to share files quickly without the hassle of cloud accounts<text:s/>or<text:s/>external drives.<text:s/></text:p>
      <text:p text:style-name="P6">Our project aims to create a tool that detects other students on the same local network (LAN) and syncs a shared project folder directly between their laptops.</text:p>
      <text:p text:style-name="Normal"><text:span text:style-name="T7">2</text:span><text:span text:style-name="T8">. Group Members</text:span></text:p>
      <text:p text:style-name="P9">Huizhe Su</text:p>
      <text:p text:style-name="P10">Arihant Jain</text:p>
      <text:p text:style-name="P11">Nizar Soufiya</text:p>
      <text:p text:style-name="P12">3. Goal</text:p>
      <text:p text:style-name="P13">To develop a peer-to-peer application that synchronizes files across a local network with a simple version-rollback safety net.</text:p>
      <text:p text:style-name="P14">4. Objectives</text:p>
      <text:list text:style-name="LFO6" text:continue-numbering="true">
        <text:list-item>
          <text:p text:style-name="P15">Establish a connection between two or more laptops on a local network without a server.</text:p>
        </text:list-item>
        <text:list-item>
          <text:p text:style-name="P16">Automatically detect when a file is added or changed in a specific local folder.</text:p>
        </text:list-item>
        <text:list-item>
          <text:p text:style-name="P17">Transfer file updates from one peer to another using C++ or Go.</text:p>
        </text:list-item>
        <text:list-item>
          <text:p text:style-name="P18">Create a simple "Version History" by saving older copies of files before overwriting them.</text:p>
        </text:list-item>
        <text:list-item>
          <text:p text:style-name="P19">Provide a clear Java-based interface to see the connection status and file history.</text:p>
        </text:list-item>
      </text:list>
      <text:p text:style-name="P20">5. Knowledge and skills required</text:p>
      <text:list text:style-name="LFO4" text:continue-numbering="true">
        <text:list-item>
          <text:p text:style-name="P21">Basic Networking: Understanding IP addresses,TCP/UDP sockets, protocols and discovery process.</text:p>
        </text:list-item>
        <text:list-item>
          <text:p text:style-name="P22">Programming: C++ or Go for the background sync logic; Java for the user window.</text:p>
        </text:list-item>
        <text:list-item>
          <text:p text:style-name="P23">File I/O: Reading and writing files and calculating basic hashes (to check if a file changed).</text:p>
        </text:list-item>
      </text:list>
      <text:p text:style-name="P24">6. Software, tools, system architecture and components anticipated</text:p>
      <text:list text:style-name="LFO2" text:continue-numbering="true">
        <text:list-item>
          <text:p text:style-name="P25">Backend: Go or C++ (handles the "listening" and "sending" of data).</text:p>
        </text:list-item>
        <text:list-item>
          <text:p text:style-name="P26">Frontend: Java (a simple dashboard to select the folder and view peers).</text:p>
        </text:list-item>
        <text:list-item>
          <text:p text:style-name="P27">Library: Standard networking libraries (e.g., "net" in Go) and basic file-watcher APIs. Possible P2P networking frameworks.</text:p>
        </text:list-item>
        <text:list-item>
          <text:p text:style-name="P28">Architecture: A "Mesh" setup where every laptop can talk to every other laptop.</text:p>
        </text:list-item>
      </text:list>
      <text:p text:style-name="P29"/>
      <text:p text:style-name="P30">7. Research expected</text:p>
      <text:list text:style-name="LFO2" text:continue-numbering="true">
        <text:list-item>
          <text:p text:style-name="P31">Peer Discovery protocols: How to find a laptop's IP address on a local network automatically.<text:s/></text:p>
        </text:list-item>
        <text:list-item>
          <text:p text:style-name="P32">Basic Conflict Handling: Implementing a "Last Write Wins" rule with an automatic backup folder to prevent data loss.</text:p>
        </text:list-item>
        <text:list-item>
          <text:p text:style-name="P33">Exploration of techniques such as vector clocks and Conflict-free Replicated Data Types (CRDTs) for handling concurrent updates.</text:p>
        </text:list-item>
        <text:list-item>
          <text:p text:style-name="P34">Understanding system behavior when nodes fail</text:p>
        </text:list-item>
        <text:list-item>
          <text:p text:style-name="P35">Connectivity constraints and limitation of WLAN and bluetooth.</text:p>
        </text:list-item>
      </text:list>
      <text:p text:style-name="P36"/>
      <text:p text:style-name="P37">8. Plan of Action</text:p>
      <text:list text:style-name="LFO7" text:continue-numbering="true">
        <text:list-item>
          <text:p text:style-name="P38">P2P Discovery: Implement local handshake and peer detection via WLAN.</text:p>
        </text:list-item>
        <text:list-item>
          <text:p text:style-name="P39">Basic Sync: Establish directory monitoring and simple file transfers.</text:p>
        </text:list-item>
        <text:list-item>
          <text:p text:style-name="P40">Multi-Peer Scaling: Optimize data transfer across three or more active peers.</text:p>
        </text:list-item>
        <text:list-item>
          <text:p text:style-name="P41">Versioning: Implement file history and automated backups.</text:p>
        </text:list-item>
        <text:list-item>
          <text:p text:style-name="P42">Conflict Resolution: Develop logic to manage file modifications.</text:p>
        </text:list-item>
        <text:list-item>
          <text:p text:style-name="P43">Network Dynamics: Ensure consistency during peer join/leave/offline events.</text:p>
        </text:list-item>
        <text:list-item>
          <text:p text:style-name="P44">Security: Implement basic read/write permissions and peer authorization.</text:p>
        </text:list-item>
        <text:list-item>
          <text:p text:style-name="P45"><text:span text:style-name="T46">Refinement: Final UI polish, bug fixing, and performance optimizatio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zar Soufiya</meta:initial-creator>
    <dc:creator>Nizar Soufiya</dc:creator>
    <meta:creation-date>2026-04-19T14:18:00Z</meta:creation-date>
    <dc:date>2026-04-19T15:00:00Z</dc:date>
    <meta:template xlink:href="Normal" xlink:type="simple"/>
    <meta:editing-cycles>6</meta:editing-cycles>
    <meta:editing-duration>PT0S</meta:editing-duration>
    <meta:document-statistic meta:page-count="2" meta:paragraph-count="5" meta:word-count="417" meta:character-count="2789" meta:row-count="19" meta:non-whitespace-character-count="2377"/>
  </office:meta>
</office:document-meta>
</file>